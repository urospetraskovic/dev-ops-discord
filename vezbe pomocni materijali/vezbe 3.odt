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hilanka" officeooo:rsid="000ae028" officeooo:paragraph-rsid="000ae028"/>
    </style:style>
    <style:style style:name="P2" style:family="paragraph" style:parent-style-name="Standard">
      <style:text-properties style:font-name="Chilanka" officeooo:rsid="000cd147" officeooo:paragraph-rsid="000cd147"/>
    </style:style>
    <style:style style:name="P3" style:family="paragraph" style:parent-style-name="Standard">
      <style:text-properties style:font-name="Chilanka" officeooo:rsid="000d73ec" officeooo:paragraph-rsid="000d73ec"/>
    </style:style>
    <style:style style:name="P4" style:family="paragraph" style:parent-style-name="Standard">
      <style:text-properties style:font-name="Chilanka" officeooo:rsid="000f119e" officeooo:paragraph-rsid="000f119e"/>
    </style:style>
    <style:style style:name="P5" style:family="paragraph" style:parent-style-name="Standard">
      <style:text-properties style:font-name="Chilanka" officeooo:rsid="000f64dd" officeooo:paragraph-rsid="000f64dd"/>
    </style:style>
    <style:style style:name="P6" style:family="paragraph" style:parent-style-name="Standard">
      <style:text-properties style:font-name="Chilanka" officeooo:rsid="000ffdcb" officeooo:paragraph-rsid="000ffdcb"/>
    </style:style>
    <style:style style:name="T1" style:family="text">
      <style:text-properties officeooo:rsid="000e9075"/>
    </style:style>
    <style:style style:name="T2" style:family="text">
      <style:text-properties officeooo:rsid="000ffd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ra 3 faze, mora build, sve sto ide u build mora da se radi I napise I da se razdvaja u multi stage build, ima tu jos 2 stvari.</text:p>
      <text:p text:style-name="P1">Kompajlirani jezici imaju prednost u odnosu na interpretirane, jer mi kad buildujemo aplikaciju dobijemo binarni fajl koji moze samo da se izvrsi, samo pokrenemo binary, ali ako nam treba python ili node js onda moramo to da razvijamo u posebnom kontejneru I onda da prebacujemo sve fajlove. </text:p>
      <text:p text:style-name="P1">Podesimo da samo root user sme da brise stvari a svi ostali korisnici smeju samo da ga izvrsavaju, to moramo da stavimo u finalne instrukcije za docker fajl, binary je od roota I dodamo novog korisnika koji je app koji je nasa sam aplikacija, tako da samo root user samo sme da brise binary a root user nikad ne pokrece taj kontejner, pogotovo ne u produkciji.</text:p>
      <text:p text:style-name="P1">Kod binarnih datoteka to je prilicno jednostavno, a sta cemo sa pythonom I node js sta cemo da radimo sa svim sto je u src ili u build folderu gde imamo gomilu node js html css fajlova, kako se izvrsava imamo sekcije gde se nalaze ti fajlovi, gledaju se tipovi, gledaju se definition fajlovi, sav source kod mora da bude u tom execution binary, takodje sve biblioteke koje imamo moraju da budu zasticene, kada nam neko upali nasu aplikaciju I ima pravo da menja sadrzaj u node modulu tj da promeni neki js fajl ili da neku nasu skriptu promeni nedo bog napravi malicioznu skriptu da nam srusi aplikaciju, znaci to je problem kod interpretiranih jezika sve moramo da pazim, node modules I source moramo da zastitimo, kod kompajlerskih jezika imamo samo 1 binary I samo njega moramo da zastitimo, I u tom kontekstu su kompajlerski jezici bolji.</text:p>
      <text:p text:style-name="P1">Znaci sto se tice securityja python I node js nisu bolji od kompajliranih jezika.</text:p>
      <text:p text:style-name="P1">PRICA SUNKA</text:p>
      <text:p text:style-name="P1">RUKA SUNKA</text:p>
      <text:p text:style-name="P1">Preporuka da uvek koristimo slim verzije, znaci node js/slim, nalazimo to na docker hubu, slim notacije su one gde je izbaceno sve nepotrebno, nemamo dodatne dependency-je, nemamo dodatne biblioteke, u slim imamo mnogo manje voulnerabilities, em je manje, em se brze pokrece, em je vise secure.</text:p>
      <text:p text:style-name="P2">Postoji I neki alpine, on je alternativa, nekad na alpineu moramo da instaliramo gomilu dependencija, pa bude vrlo malo razlike izmedju alipinea I drugih verzija, uvek uzmimo to u obzir, ako alpine proradi iz prve, ako moramo da budzimo onda je sve pitanje da li cemo da koristimo neku slim verziju I resimo iz prve ili cemo se cimati sa alpine da bi radilo kako smo zamislili.</text:p>
      <text:p text:style-name="P3">Ima neki link u prezentaciji za neki huddle link nesto koji instaliramo I on skenira nase docker fajlove koji ce da skenira nase docker fajlove da vidi da li ima nekih problema, ako ima problema on nas nece pustiti dalje da merge-ujemo, dok to ne resimo.</text:p>
      <text:p text:style-name="P3">Moramo da pravimo razliku izmedju shell I exe varijante izmedju cmd I enter point komande u docker fajl. Entry point nam je osnova, cmd su svi dodatni prefiksi koje stavljamo na entry point, Ako imamo definisani entry point onda je cmd samo sufiks koji stavljamo tamo, mi samo u CMD stavljamo main.js node.js u finalnom kontejneru. </text:p>
      <text:p text:style-name="P3">Root u procesnom stablu je shell procesa, ili bash, zavisi sta smo podesili u kontejneru, imamo shell opciju gde mi definisemo sta je zapravo shell.</text:p>
      <text:p text:style-name="P3">Na ctrl + c mi saljemo signal za prekidanje rada kontejnera, sto mozemo da testiramo, slicna stvar je za entry point, on isto ima shell I exec varijantu.</text:p>
      <text:p text:style-name="P3">JAKO JE LOSA PRAKSA DA STAVIMO TACKU GDE JE BUILD KONTEKST, da nebi krenuo opet da builduje kontejner iz pocetka do koraka gde nam je invalidna akcija, ovo je vid neke optimizacije da imamo clean build context, da sve sto je vezano za buildovanje nase aplikacije, odovojen folder koji se zove files ili build, on ga zove I docker, I onda ima za pojedine aplikacije sta mu sve treba, za ove I one aplikacije sve se nalazi na drugim mestima, negde to nije jednostavno, pogotovo ako koristimo frameworke, ako moramo da ispostujemo odgovarajucu strukturu frameworka, ali sreca to radi sa rustom pa to uvek prolazi, alternativa ako to ne uradimo moramo da koristimo docker fajlove, definisemo sta sve nije deo konteksta I moramo da imamo clean context, <text:span text:style-name="T1">prosledjujemo mu build context I docker fajl, time sto imamo tu klijent server arhitekturu to ne mora da bude na istoj masini, ovaj server moze da bude na AWS-u, imamo wc2 instancu koja ima </text:span><text:soft-page-break/><text:span text:style-name="T1">instaliran docker, imamo fajl koji buidluje docker profile, tako da sada salje na toj instanci da builduje tu sliku. To je primer dobar ako imamo GPU I sad nemamo invidija karticu, instaliramo invidija drajvere I to imamo na amazon wc2 instanci I ne mzoemo to da buildujemo I onda mi imamo lokalnu instancu I profile I onda tu mzoeom da buildujemo sliku npr na AWS-u, cisto nam govori sta sve mozeom da radimo.</text:span></text:p>
      <text:p text:style-name="P4">Imamo nacin kako se pravi alias u docker fajlu, </text:p>
      <text:p text:style-name="P4">SUNKA ZAJEBO UNCLE BOBA, nije clean code nego je clear code. </text:p>
      <text:p text:style-name="P5">CI/CD fajl je blueprint za sastavljanje nase aplikacije, developeri su naterani da sami pisu taj CI/CD fajl, slajd 15 imamo pom.xml fajl I on se jako retko pokrece, obicno se pokrece ispod toga, ako menjamo nesto poput naziva aplikacije onda cemo morati da pokrecemo I pom.xml ali najcesce ne moramo, ovde imaju 2 verzije aplikacije za buster I alipine, <text:span text:style-name="T2">ovo je korisno ako radimo sa kompajliranim jezicima pa treba da generisemo razlicite slike za razlicite arhitekture, neke za x86 neke za ARP I tako to.</text:span></text:p>
      <text:p text:style-name="P6">Jdk je java development kit, a jre je java runtime enviroment, jdk pored development masine imamo I gomile alata koji se koriste kod buildovanja I imamo I same kompajlere, dok kod jre se nalaze stvari potrebne samo za izvrsavanje, ne mora nista da se builduje jer je vec sve sredjeno, a jdk je kad moramo vise stvari da radimo.</text:p>
      <text:p text:style-name="P6"/>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6T14:36:32.819534744</meta:creation-date>
    <dc:date>2026-04-16T15:47:57.161082898</dc:date>
    <meta:editing-duration>PT28M42S</meta:editing-duration>
    <meta:editing-cycles>5</meta:editing-cycles>
    <meta:generator>LibreOffice/7.3.7.2$Linux_X86_64 LibreOffice_project/30$Build-2</meta:generator>
    <meta:document-statistic meta:table-count="0" meta:image-count="0" meta:object-count="0" meta:page-count="2" meta:paragraph-count="18" meta:word-count="974" meta:character-count="5571" meta:non-whitespace-character-count="4611"/>
  </office:meta>
</office:document-meta>
</file>