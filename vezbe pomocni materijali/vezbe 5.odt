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hilanka" officeooo:rsid="001b444b" officeooo:paragraph-rsid="001b444b"/>
    </style:style>
    <style:style style:name="P2" style:family="paragraph" style:parent-style-name="Standard">
      <style:text-properties style:font-name="Chilanka" officeooo:rsid="001cf7b3" officeooo:paragraph-rsid="001cf7b3"/>
    </style:style>
    <style:style style:name="P3" style:family="paragraph" style:parent-style-name="Standard">
      <style:text-properties style:font-name="Chilanka" officeooo:rsid="001d9802" officeooo:paragraph-rsid="001d9802"/>
    </style:style>
    <style:style style:name="P4" style:family="paragraph" style:parent-style-name="Standard">
      <style:text-properties style:font-name="Chilanka" officeooo:rsid="001e4025" officeooo:paragraph-rsid="001e4025"/>
    </style:style>
    <style:style style:name="P5" style:family="paragraph" style:parent-style-name="Standard">
      <style:text-properties style:font-name="Chilanka" officeooo:rsid="001fc2a3" officeooo:paragraph-rsid="001fc2a3"/>
    </style:style>
    <style:style style:name="P6" style:family="paragraph" style:parent-style-name="Standard">
      <style:text-properties style:font-name="Chilanka" officeooo:rsid="0020779f" officeooo:paragraph-rsid="0020779f"/>
    </style:style>
    <style:style style:name="P7" style:family="paragraph" style:parent-style-name="Standard">
      <style:text-properties style:font-name="Chilanka" officeooo:rsid="002242ca" officeooo:paragraph-rsid="002242ca"/>
    </style:style>
    <style:style style:name="P8" style:family="paragraph" style:parent-style-name="Standard">
      <style:text-properties style:font-name="Chilanka" officeooo:rsid="0022f47b" officeooo:paragraph-rsid="0022f47b"/>
    </style:style>
    <style:style style:name="P9" style:family="paragraph" style:parent-style-name="Standard">
      <style:text-properties style:font-name="Chilanka" officeooo:rsid="00237be4" officeooo:paragraph-rsid="00237be4"/>
    </style:style>
    <style:style style:name="P10" style:family="paragraph" style:parent-style-name="Standard">
      <style:text-properties style:font-name="Chilanka" officeooo:rsid="0023c9a1" officeooo:paragraph-rsid="0023c9a1"/>
    </style:style>
    <style:style style:name="P11" style:family="paragraph" style:parent-style-name="Standard">
      <style:text-properties style:font-name="Chilanka" officeooo:rsid="0025c68a" officeooo:paragraph-rsid="0025c68a"/>
    </style:style>
    <style:style style:name="P12" style:family="paragraph" style:parent-style-name="Standard">
      <style:text-properties style:font-name="Chilanka" officeooo:rsid="00270e38" officeooo:paragraph-rsid="00270e38"/>
    </style:style>
    <style:style style:name="P13" style:family="paragraph" style:parent-style-name="Standard">
      <style:text-properties style:font-name="Chilanka" officeooo:rsid="0027f8b8" officeooo:paragraph-rsid="0027f8b8"/>
    </style:style>
    <style:style style:name="P14" style:family="paragraph" style:parent-style-name="Standard">
      <style:text-properties style:font-name="Chilanka" officeooo:rsid="002961d6" officeooo:paragraph-rsid="002961d6"/>
    </style:style>
    <style:style style:name="P15" style:family="paragraph" style:parent-style-name="Standard">
      <style:text-properties style:font-name="Chilanka" officeooo:rsid="002ae3b8" officeooo:paragraph-rsid="002ae3b8"/>
    </style:style>
    <style:style style:name="P16" style:family="paragraph" style:parent-style-name="Standard">
      <style:text-properties style:font-name="Chilanka" officeooo:rsid="002cb02a" officeooo:paragraph-rsid="002cb02a"/>
    </style:style>
    <style:style style:name="P17" style:family="paragraph" style:parent-style-name="Standard">
      <style:text-properties style:font-name="Chilanka" officeooo:rsid="002cfad4" officeooo:paragraph-rsid="002cfad4"/>
    </style:style>
    <style:style style:name="P18" style:family="paragraph" style:parent-style-name="Standard">
      <style:text-properties style:font-name="Chilanka" officeooo:rsid="002f00c0" officeooo:paragraph-rsid="002f00c0"/>
    </style:style>
    <style:style style:name="P19" style:family="paragraph" style:parent-style-name="Standard">
      <style:text-properties style:font-name="Chilanka" officeooo:rsid="002fc9a0" officeooo:paragraph-rsid="002fc9a0"/>
    </style:style>
    <style:style style:name="P20" style:family="paragraph" style:parent-style-name="Standard">
      <style:text-properties style:font-name="Chilanka" officeooo:rsid="003152e4" officeooo:paragraph-rsid="003152e4"/>
    </style:style>
    <style:style style:name="P21" style:family="paragraph" style:parent-style-name="Standard">
      <style:text-properties style:font-name="Chilanka" officeooo:rsid="00319e65" officeooo:paragraph-rsid="00319e65"/>
    </style:style>
    <style:style style:name="P22" style:family="paragraph" style:parent-style-name="Standard">
      <style:text-properties style:font-name="Chilanka" officeooo:rsid="003390a8" officeooo:paragraph-rsid="003390a8"/>
    </style:style>
    <style:style style:name="P23" style:family="paragraph" style:parent-style-name="Standard">
      <style:text-properties style:font-name="Chilanka" officeooo:rsid="0035125f" officeooo:paragraph-rsid="0035125f"/>
    </style:style>
    <style:style style:name="P24" style:family="paragraph" style:parent-style-name="Standard">
      <style:text-properties style:font-name="Chilanka" officeooo:rsid="00353817" officeooo:paragraph-rsid="00353817"/>
    </style:style>
    <style:style style:name="T1" style:family="text">
      <style:text-properties fo:font-style="italic" style:font-style-asian="italic" style:font-style-complex="italic"/>
    </style:style>
    <style:style style:name="T2" style:family="text">
      <style:text-properties fo:font-style="italic" officeooo:rsid="0023c9a1" style:font-style-asian="italic" style:font-style-complex="italic"/>
    </style:style>
    <style:style style:name="T3" style:family="text">
      <style:text-properties fo:font-style="italic" officeooo:rsid="002cb02a" style:font-style-asian="italic" style:font-style-complex="italic"/>
    </style:style>
    <style:style style:name="T4" style:family="text">
      <style:text-properties fo:font-style="italic" officeooo:rsid="002f5575" style:font-style-asian="italic" style:font-style-complex="italic"/>
    </style:style>
    <style:style style:name="T5" style:family="text">
      <style:text-properties fo:font-style="italic" officeooo:rsid="00319e65" style:font-style-asian="italic" style:font-style-complex="italic"/>
    </style:style>
    <style:style style:name="T6" style:family="text">
      <style:text-properties fo:font-style="italic" officeooo:rsid="00336283" style:font-style-asian="italic" style:font-style-complex="italic"/>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d god koristimo idle state, sleep infinity, trebace nam 10ak sekundi dok ne istekne timeout, trebace nam duze da se obrise, prvo dobije terminated signla, onda ide na kill, force, I tada se ubija proces I to je to, ovde mozemo videti priliku da moramo da ispostujemo pravila koja nudi kubernetes, znaci da obradjujemo terminani signal, I da na konkretan nacin obradimo biznis logiku, vratimo greske, sve sto nam treba terminiramo I ubijemo proces. </text:p>
      <text:p text:style-name="P2">Setujemo ko je owner a ko je kontroler, imamo opciju block owner deletion, pomocu ove 3 vrednosti mi kontrolisemo garbage colleector unutar kubernetesa, kada ga podesimo na true I obrisemo resurs, on automatski pokrece ceo chain da se brisu svi njegovi child objekti, napravi taj dependency path, krece od njih, brise od nazad, ako ja imam podesen objekat dojo, imam ownership na deployment, dok god se ne obrise deployment od strane garbage collectora, on ce biti u terminated state-u, dokle god se kontejner iz docker enginea ne obrise, tako ce I dojo da bude u terminated state-u, dokle god se ne obrise deployment, deployment isto ima svoj life cycle kako se brise, sta sve treba da se odradi u pozadini.</text:p>
      <text:p text:style-name="P2">Postoji block owner deletion, jedan objekat moze da ima vise objekata a jedan kontroler, znaci u koliko postoji vise objakata a ovo setovano na true onda ne moze da se obrise ako je vise objekata podeseno na njega, tu moze da dodje do deadlocka I zato je preporuka da se ne koristi block owner deletion I da ne koristimo veze 1 na vise, nego 1 na 1, a ako nam vise objekta zavisi od necega onda implementiramo neke labele I primenjujemo logiku ko sve sta koristi I na taj nacin dobijemo sta se desi kada se ukloni taj objekat I sta sve moze da prouzrokuje.</text:p>
      <text:p text:style-name="P2">Reflektor I informer, arhitektura kubernetesa, funkcija setup with manager, koristi se builder designer pattern, kreiramo konfiguraciju I zavrsimo sa tim complete sekciju, po defaultu nam izgenerise to sto treba, posmatramo sve eventove za dojo resurse, ali takodje posmatramo sve deploymente koji ownuju dojo objekat, I imamo ownership za dojo resurse.</text:p>
      <text:p text:style-name="P3">Sad cemo morati da prosirimo reflektor, radicemo konekciju ka bazi.</text:p>
      <text:p text:style-name="P4">Pre nego sto radimo konekciju ka bazi prvo radimo sitne stvari koje ce nam dosta pomoci, pomazu nam da znamo kako se radi skaliranje, kako se nakacimo na taj mehanizam autoscalinga unutar kubernetesa, mi kada imamo neki deployment resurs nasa aplikacija mozemo da korsitmo ovu /scale komandu da menjamo broj replika cuecuttle scale, to je malo intuitivnija komanda, umesto da u yaml falju menjamo broj, mi to preko cuecuttle menjamo I to se salje na api server, veliki deo stvari koje mi menjamo u yaml fajlu postoji odgovarajuca cuetuttle komanda, sad necemo da scale samo radi za deployment I application scale nego da radi I za dojo resurse, takodje taj scale se koristi od strane autoscalera, kad mi hocemo da podesimo, ok minimum je 1, maximum je 10 replika, ali odrzavaj tako da cpu usage bude 70 posto, ako na nekom podu usage bude 90 posto on ce kreirati drugu repliku sa 2 replike od 80 posto, nije dovoljno I onda kreira jos jednu I onda imamo 3 replike od po 70 posto, znaci mi mu zadamo te targete I on pokusava da odrzava taj procenat.</text:p>
      <text:p text:style-name="P5">Kako se radi skaliranje, koristi se scale pod resurs, u rest api-ju sta je podresurs, pomocu odredjene putanje mi kazemo sta zelimo da radimo na internetu imamo payload I imamo neke akcije, uspostavljamo komunikaciju na internetu I sve je uspotsavljeno kao resurs I onda generalno sta ljudi rade je PUT/POST <text:span text:style-name="T1">api/</text:span><text:span text:style-name="T7">v1/booking/ I na ovom pathu kreiraju post put I get metodu, tu ce biti I </text:span><text:span text:style-name="T1">{id} za get metodu a za put I post bi bilo api/v1/booking/{id}, GET/api/v1/booking/bed_number, znaci ovo booking je resurs a bed_number je pod resurs, I sad mi ako samo hocemo da patchujemo broj soba mi samo ukucamo na tom pathu I trebali bi da dobijemo samo tu vrednosti, ne treba ceo booking objekat jer on moze da bude ogroman nama treba samo da vidimo tu jednu vrednost.</text:span></text:p>
      <text:p text:style-name="P6"><text:span text:style-name="T1">On nam ovo prica jer smo mi vec krenuli da radimo sa kubernetesovim API-jem, custom resource definition je da registrujemo na api serveru novi restful path, na tom pathu se primenjuje open w3 sema koja se definise u custom resourceu, I u nasem resursu recimo dojo mi mozemo da podesavamo I pod resurse, imamo status, imamo scale, imamo </text:span><text:soft-page-break/><text:span text:style-name="T1">finalizer, imamo sam dojo path, dojo/status, dojo/scale… to je ono sto mi mozemo da koristimo u nasem custom resursu.</text:span></text:p>
      <text:p text:style-name="P6"><text:span text:style-name="T1">Rekli smo prosle nedelje da reconciler moze da menja samo status I mi kad koristimo funkciju r.status.update mi zapravo gadjamo ovaj endupoint dojo/status, a kada user kreira preko yaml fajla on zapravo radi create tj. Put na sam resurs, znaci spec se menja dojo, status se menja dojo/statsu, scale se menja na dojo/scale, I mi zapravo omogucavamo podrsku cuecuttle scale komandi I integrisemo to sa autoscalerom, ima I drugih scalera, karpenter, keda, imamo vise razlicitih implementacija autoscalera, svi se oslanjaju na /scale api, on koristi koliko ce zapravo replika da ima, I zasto se to radi, da bi smo mi zapravo mogli dobro da iskonifugurisemo permisije, I mi kada pravimo reconciler nama queuebuilder izgenerise takav rbac, takve permisije, on sme ovo samo da cita, a sme da menja samo status, znaci mi ako pokusamo u reconcileru da posaljemo put request na dojo <text:s/>resursu, to je namerno tako u kubernetesovom tome podesno, ne moze da se desi da menjamo spec, mi treba da vidimo status I da prebacimo taj resurs u zeljeno stanje ako moze.</text:span></text:p>
      <text:p text:style-name="P7"><text:span text:style-name="T1">Prvo sto treba da uradimo da bi scaler radio je selektor, dodajemo field koji se zove selektor, on je tipa string I on je opcioni, druga stvar je da moramo da dodamo permisije, pomocu ovih builder notacija, sacemo proci kroz to, nije nista komplikovano, mi smo dobii ovo po defaultu, kada kreiramo novi resurs pomocu komande on nam definise dojo struct, dodaje notacije, kazemo da li je ovo root objekat, jeste, I kazemo da mozemo da koristimo status endpoint, ne sme da menja spec jer to menjaju useri.</text:span></text:p>
      <text:p text:style-name="P7"><text:span text:style-name="T1">Sad hocemo da omogucimo da reconciler moze da menja dojo/scale endpoint I zato dodajemo resurs scale I treba da se cita iz fielda koji je spec/replicas, u nasem dojo resursu imamo account id, imamo koji tip baze se koristi, imamo naziv I imamo replicas, iz spec dela uzmemo replicas film, mogli smo da ga nazovemo na bilo koji drugi nacin, ali to definisemo sa ovom komandom, to nije dovoljno za scale, treba da definisemo status path, koji se odnosi na broj replika, tada ce zapravo da budu replike spreme, kada cemo da zavrsimo svo skaliranje I treba da najdemo nacin kako da pratimo to, posebno polje readyreplicas se koristi da gledamo koliko su zapravo replike spremne da slusaju, to taj autoscaler gleda, a li se to poklopilo sa specom replika, dokle god se ne poklopi ono scaluje replike, treba nam filter zbog toga, I treba da radmo selektore, treba nam posebno polje samo za selektore, kako se radi skaliranje imamo u dokumentaciji I detaljnije, on je presao najbitnije, imamo queuebuilder subresurs notaciju I tu koristimo slican pattern, mozemo scale, finalizer I ono drugo sto nam nudi API, u zavisnosti od tipa subresursa imace odgovarajuce propertije koje mozeom da iskonfigurisemo, nije isto kada radimo scale status ili finalizer, za status nam treba samo naziv resursa a za scale treba I dodatne parametre da izkonfigurisemo.</text:span></text:p>
      <text:p text:style-name="P8"><text:span text:style-name="T1">Imamo ready, up to date, available propertije, kako se to radi, opet pomocu tih queue buidler notacija, koristimo print column, stavimo naziv I putanju json patha I koliko fielda treba da se procita, koristimo print column, naziv I kako se radi, kog je tipa, kako se radi json path, I odakle cupamo tu vrednost, dodacemo jos 2 nase kolone koje su nama od interesa, akaunt, znaci ko je vlasnik dojo resursa, account id, to bi trebalo da bude neki owner, I kog je tipa storage, dal je tipa postgresi ili mongodb, </text:span></text:p>
      <text:p text:style-name="P8"><text:span text:style-name="T1"/></text:p>
      <text:p text:style-name="P9"><text:span text:style-name="T1">Od podresursa imamo I /log /exect /approval I jos neke, I za sve to koristimo kubebuilder notacije.</text:span></text:p>
      <text:p text:style-name="P9"><text:span text:style-name="T1">Ideja za postgres bazu je sledeca, mi ocekujemo da je baza vec dostpuna kada radimo deployment dojo resursa, on ocekuje kad neko dodje na odbranu da prvo izkonfigurise postgress bazu I uradi apply I da tu doda konfiguraciju za dojo I da uradi na pravi nacin, uredu je da kroz vise interacija sa helm chartu dodjemo do pravog rezultata, moramo da implementiramo helm chart, koristimo odvojene konfiguracije za mongo, odvojene konfiguracije za postgress bazu, ne mozemo u isto vreme, uradimo to odvojeno, uglavnom u praksi postoji kada se pise helm chart, imamo values yaml fajl, I mi pisemo kako ce izgledati struktura, koristimo postgress pg: enabled: on moze da bude ili true ili false, I onda imamo nasu konfiguraciju vezanu za podgress pa mozemo tu imati mongo: </text:span><text:soft-page-break/><text:span text:style-name="T1">enabled: opet true ili false, ima svoje fieldove, imamo nasu aplikaciju app: enabled: true ili false, znaci to sve ide u vaues.yaml, znaci app: enabled: pa ispod name: pa ispod database: pg ili mongo</text:span></text:p>
      <text:p text:style-name="P9"><text:span text:style-name="T1">skroz je okay da ja u prvoj verziji recimo kazemo enabled na true, izkonfigurisemo postgress bazu a ovo mongo stavimo na false, I ovo na false, mi uradimo helm install sa tim vrednostima I on podigne postgress bazu, kada se to uspesno zavrsi onda uradimo izmenu kazemo da je sada aplikacija enabled na true I izkonfigurisi sve sto mi treba, to je skroz okay princip, mogli smo mi u jednom pokusaju app I pg na true, ali onda imamo problem oko trkanja koji ce resurs biti prvi kerirain, mi zahtevamo da postoji odgovarajuci secret, I da se iz tog secreta attachuje deployment na port, I kad aon to kreira onda on svuce sliku ili sta vec, mi cemo imati problem I to ce pucati, I to cesto ljudi kad rade sa kubernetesom imaju helm chart sve je lepo izkonfigurisano imamo helm instal I to ne radi kako treba jer nije namenjeno da sve radi u jednom prolazu treba da se radi postepeno, ne mozemo sve odjednom jer imamo race condition, ima developera koji mnogi ne znaju da debuguju taj nacin, imamo continous deployment koji se trigeruje na svaki yaml fajl, proso je deployment helm se zavrsio ali helm nece da izbaci gresku ako nismo dobro izkonfigurisali bazu, to kazu da je najveci problem helma ali to nije njegova nadleznost, ako kreiramo secret a mi promasimo slovo u passwordu nasa aplikacija ce bacati errore, ali to je na nama da popravimo, to je do nas, nije do helma, helm sluzi da pravimo template-ove, da omogucimo da na jednostavan nacin ljudi provisionuju resurse unutar klastera, nema smisla da rucno pisemo resurse, dosli su ljudi, napravili su helm chart, imamo master konfiguraciju, koliko imamo read replika, tako ih iskonfigurisemo, podesavamo te parametre yaml fajla I pomocu helm installa instaliramo, iz vise iteracija, jer ne mozemo sve odjednom da primenimo, imamo na internetu. </text:span></text:p>
      <text:p text:style-name="P9"><text:span text:style-name="T1"/></text:p>
      <text:p text:style-name="P9"><text:span text:style-name="T1">Na google kuca bitnami helm charts, </text:span><text:span text:style-name="T2">biramo koju tehnologiju hocemo neka gomila foldera, kasandra kafka arlcd, to su sve neki helm chartovi koji su odrzavani od strana communitija, pogledamo taj chart, pogledamo kako se taj yaml fajl konfigurise, I deployjujemo kafka cluster unutar kubernetesa, npr evo on uzo kafku, imamo uputstvo kako se koristi, kako da upgradujemo izmedju verzija, mi uzmemo values.yaml fajl I gledamo da izkonfigurisemo taj fajl, nisu mali ti fajlovi, prilicno su veliki, za jednostavne primere se svodi da napisemo 20-30 linija fajla.</text:span></text:p>
      <text:p text:style-name="P9"><text:span text:style-name="T2"/></text:p>
      <text:p text:style-name="P10"><text:span text:style-name="T1">Proslih godina je trebalo 10ak kontejnera da se depolyjuju, oni su korsitli prometheus helm chart, koristili su monogo helm chart za mongo db, oni su pisali svaki mikroservis odvojeni helm chart koji deployjuje njihovu aplikaciju, to se nadovezuje na bazu I nadovezuje se na prometheus, oni osmisljavaju kako sve to moze da se uveze sa bazom, oni su imali staticnu arhitekturu I to je to.</text:span></text:p>
      <text:p text:style-name="P10"><text:span text:style-name="T1">Kod nas je to dinamicko, kako je to zamisljeno, mi komuniciramo sa API serverom, I definisemo stanje, e sad, staticki radimo konfiguraciju pomocu helma, imamo kubernetesov api server, I sva stanja izmena unutar klastera idu preko api servera, mi cemo morati staticno da omogucimo pomoicu helma, znaci pisacemo nas helm chart, tamo he postgres, tamo je mongo ili redis I aplikaciju I treba nam opcija da se povezujem sa postgress bazom I prometheusu, I sa drugim stvarima, I to ce nam biti jedan nacin da testiramo nas operator kako radi, znaci on uzme I zeza values yaml fajl kako da se konfigurise, bilo bi dobro da imamo uptstvo kako se to radi from scratch, mi napravimo instruckije u kom redosledu se desavaju stvari, imamo redosled resursa da neki ne zablokiraju druge, mi nama mozemo da damo uputstvo kako se sve to kreira da imamo za nas. Drugi nacin je da ne radimo preko helm charta nego da radimo preko kubectl-a, mi cemo jos dodatno morati da uradimo preko admin panela, admin panel ce biti aplikacija koja korsti kubernetes biblioteku I kreirati rest zahteve dinamicki, znaci kada on klikne na panelu ovo je naziv aplikacije, ja sam ti owner, ovo je mongo, hocu toliok replika mi treba da procesiramo taj zahtev I da prvo posaljemo rest zahtev, kreiraj postgres bazu u resurs, kreiraj prometheus resurs, kreiraj mi secret, kreiraj mi deployment, kreiraj mi dojo, I manje vise to je to, operatori bi trebali sve ostalo da rese za nas, znaci mi kreiramo </text:span><text:soft-page-break/><text:span text:style-name="T1">postgress bazu resurs, mi kreiramo resurs a operator nam resi postgress bazu, mi krekraimo prometheus klaster, prometheus operator ce resiti, kreiramo dojo aplikaciju I onda ce dojo operator resiti.</text:span></text:p>
      <text:p text:style-name="P10"><text:span text:style-name="T1">Znaci ne treba da nas dojo operator da kreira I bazu I ovo I ono, nego se oslanja na druge operatore, zato je bitan taj redosled. </text:span></text:p>
      <text:p text:style-name="P11"><text:span text:style-name="T1">Ono sto on radi uz pomoc helma u vise iteracija mi moramo u admin panelu da to izhendlujemo, moramo da kreiramo te korake koji su se rucno radili preko helma mi moramo da implementiramo to u nasoj aplikaciji sto je panel I to da kreiramo resurse u klasteru.</text:span></text:p>
      <text:p text:style-name="P12"><text:span text:style-name="T1">Ako hocemo da testiramo opterecenje mozemo da koristimo litmus I house, on to nece traziti ali ocekuje da funkcionise sve normalno, ako poveca broj replika da ce idalje da radi, nece sad biti da podignemo 100 aplikacija, ako korektno radi to je to, I to ce samo po sebi biti poprilicno naporno, tesko je pisati operator svakako, moramo na 1000 slucajeva da mislimo kako da izadjemo iz cirkularne petlje, redosled, 100 1000 stvari.</text:span></text:p>
      <text:p text:style-name="P13"><text:span text:style-name="T1">Znaci mi imamo manju aplikaciju, obezbedjujemo kreiranje preko helm charta, I onda prelazimo na nas radni panel, tako sve to radi.</text:span></text:p>
      <text:p text:style-name="P13"><text:span text:style-name="T1"/></text:p>
      <text:p text:style-name="P14"><text:span text:style-name="T1">Ako hocemo da radimo konfiguraciju sa postgress bazom, u env varijabli treba da budu podeseni database user I password I tako to, I potsavlja se pitanje kako da kreiramo secret I kako da dobijemo kredencijale za password, jedno resenje je da napravimo custom resurs koji se zove postgress, napravimo custom kontroler koji bi kreirao stateful set I secret I onda bi koristili taj kontroler I operator da kreiramo bazu I rucno da implementiramo I onda nakon toga da implementiramo dojo resurs. Pisanje kontrolera za postgres bazu je jako tesko, ono sto mi budemo pravili nece biti primenljivo u industriji, ovo je namerno stavljeno da mi istrazujemo koji svi operatori postoje u kubernetes eko sistema, to ce nam trebati kada budemo nesto ozbiljnije radili sa kubernetes klasterom, mi korsitimo gotov operator za postgress bazu, zove se cloud native pg operator. </text:span></text:p>
      <text:p text:style-name="P14"><text:span text:style-name="T1">I kada odemo na taj cloud native pg, mi mozemo da kliknemo na nove resurse I da vidimo sta nam sve taj operator nudi na izlaganju, mi smo samo napravili dojo, neko drugi je napisao operatore za postgress bazu, jedan od ovih resursa je cluster gde mi mozemo da definisemo postgress cluter, mozemo da definisemo backup, mozemo da definisemo schedule backup, mozemo da definisemo database, kako ce se definseati sema, koji ce se format koristiti, kliknemo na cluster I imamo kompletan API kako sve izgleda spec I status.</text:span></text:p>
      <text:p text:style-name="P14"><text:span text:style-name="T1"/></text:p>
      <text:p text:style-name="P15"><text:span text:style-name="T1">Sad ce proci kroz operator da vidi kako se koristi, </text:span><text:span text:style-name="T3">znaci nama je bitna ova bootstrap I database resursi, sigurno cemo naleteti na initdb proces, mozemo from scratch ili na osnovu postojece klustera, mi cemo ovde koristiti initdb, ono sto je bitno je da pored instanci I storage-a imamo sekciju gde definisemo bootstrap, koristimo initdb I kreiramo database: application</text:span></text:p>
      <text:p text:style-name="P16"><text:span text:style-name="T1">owner: app</text:span></text:p>
      <text:p text:style-name="P16"><text:span text:style-name="T1">secret:</text:span></text:p>
      <text:p text:style-name="P16"><text:span text:style-name="T1"><text:tab/>name: app secret</text:span></text:p>
      <text:p text:style-name="P16"><text:span text:style-name="T1">ovo je primarno sto cemo mi koristiti, nas dojo operator ce procitati sadrzaj tog secreta I stavice to kao env varijable u nas pod, to je primarno sto mi koristimo, ovde imamo primer kako izgleda taj app secret, to nam je bitno da bi znali da parsiramo data sekciju u username I password, to su filovi koje mi citamo, I na osnovu toga mi konfigurisemo nasu bazu.</text:span></text:p>
      <text:p text:style-name="P16"><text:span text:style-name="T1">Database je resurs gde kreiramo semu baze unutar postgress clustera, mi kada kreiramo cluster treba da definisemo barem jednu bazu, ako hocemo vise razlicitih baza npr 5 mikroservisa mi treba da imamo 5 sema baze podataka I onda koristimo database resurs za sve te seme I onda ce sve postgress operator da odradi za nas. To je prava moc kubernetesa, sve sto radimo preko yamla sto bi inace morali da pisemo skripte, migracije, procese, sad imamo operator koji to moze da handluje za nas, osim ako nesto nije bas bas specificno onda moramo da pisemo skripte I migracije, to je kubernetes filozofija, </text:span><text:soft-page-break/><text:span text:style-name="T1">sve pisemo pomocu yamla, samo treba dobro to da izkonfigurisemo, sve to ce operatori da rese.</text:span></text:p>
      <text:p text:style-name="P16"><text:span text:style-name="T1">Znaci ovi bootstrap I database resursi mnogo olaksavaju manageovanje postgress bazom.</text:span></text:p>
      <text:p text:style-name="P17"><text:span text:style-name="T1">Na helm repo dodamo njihov chart I instaliramo njihov operator, znaci helm upgrade install cnpg namespace cnpg system create namespace cnpg/cloudnative -pg,</text:span></text:p>
      <text:p text:style-name="P17"><text:span text:style-name="T1">instalira se pg operator za postgress bazu I on slusa sve eventove koji su vezani za sve resurse koje je on provide-ovao.</text:span></text:p>
      <text:p text:style-name="P17"><text:span text:style-name="T1"/></text:p>
      <text:p text:style-name="P18"><text:span text:style-name="T1">Kad kopira iz pdfa prezentacije cesto umeju tabovi da budu problem, </text:span><text:span text:style-name="T4">da pazimo na to.</text:span></text:p>
      <text:p text:style-name="P19"><text:span text:style-name="T4">I</text:span><text:span text:style-name="T1">zmenio je logiku reconcilea da ako postoji da ga onda kreira iz operatora pa onda tek da kreira deployment I setuje tako da to onda tek bude secret, sve fieldove koje stoje u secretu tretiramo kao enviroment.</text:span></text:p>
      <text:p text:style-name="P20"><text:span text:style-name="T1">S obzirom da koristimo cnpg operator mi moramo da kreiramo taj neki secret, on je uspeo da kreira taj nas secret unutar clustera ali ovaj init db job je u pendingu I treba da skonta sta je problem, znaci mi trebamo da gledamo nas opeator treba da gleda se promene koje su se desile na secret, nesto se odradi to mora da se updatuje, ako se promeni password mi moramo da pratimo promenu, updatujemo password I restartujemo kod, mi na izmenu secrtea treba da odreagujemo na takav nacin, da bi smo gledali secrete mi moramo da nabudzimo nasu setup with manager metodu, do sada smo rekli posmatraj sve dojo resurse, posmatraj sve dojo objkete koji su sa dojo resursom, ali isto moramo da odreagujemo na eventove koji su se desili na promene ovog secreta od strane cloud native pg opertora, posmatramo sve secrete I hocemo da definisemo handler, koji ce zapravo pronalaziti, radice taj mapping I u builder u ce raditi forward na odgovarajuci reconciler, watches ima 3 ulazna parametra, object, tip resrusa koji se posmatra, I posmatramo secret, ali sta je tu problem, ne zelim da moj operator da ga preopteretim I da posmatram sve secrete unutar clustera, zasto je to lose, rekli smo da reflektor ima svoj cache I da sve promene koje se desavaju da ih cuva u cache, mi kada podesimo da sve secrete unutar clustera I one koji su nevezani za nasu aplikaciju on njih spuca u cache, posle nekog vremena operatoru raste memorija I moze da ima prolblem sa te strane da ima taj memory leak, bas zbog toga sto nismo lepo konfigurisali watches, posmatra sve, nismo ga lepo konfigurisali, imamo odredjeni secret koji generise postgress operator, to filtriramo korstimo watches, korsitimo tip resurs secret, imamo funkciju koja filitrira tip objekta koji treba procesirati, event handler mapira izfiltrirani objekat koji se stavlja u work queue I time se pokrece reconciler petlja.</text:span></text:p>
      <text:p text:style-name="P20"><text:span text:style-name="T1">Onaj dijagram moramo da znamo u sred noci, imamo API server, on jedini sme da edituje bazu, ni kublet ni control manager ni scheduler ne smeju da pipaju bazu, sve promene unutar clustera I sve sto hocemo da obavljamo ide sa servera I prati restful princip, refaktor posmatra promene, mi taj refaktor konfigurisemo, sve trpa u cache, on raste raste raste I ako ne konfigurisemo dobijemo memory leak I pravimo haos, u workd queue se trpa <text:s/>samo jedinstveni id koji je u formatu namespace/name, I ovde se radi deduplication, zasto se to radi, npr ako imamo 5 izmena za dojo aplikaciju namespace je default/dojo I bice 5 takvih rekorda u queue, ne interesuju nas sve promene nego nas interesuje samo ona poslednja, u work queue ce biti samo 1 item, nece da nam spamuje nas operator, necemo imati problem sa dedup, mi uradimo 5 promena I on se znaci triggeruje samo jednom, to poslednje stanje nam pokaze I mi pokusavamo da dovedem objekte u stanje koje je definisano, get cupa podatke iz cachea. </text:span></text:p>
      <text:p text:style-name="P20"><text:span text:style-name="T1">Ovaj reflektor konfiguresmo tako, ali moramo da pazimo sta filitriramo to je onaj predicate, I imamo event hander, mozemo da pisemo custom logiku za njega, predicate pisemo pre ulaza u reflektor a predicate pisemo na izlazu iz reflektora iz slike, zasto, na jedan secret treba da reaguju 5 aplikacija, mi u queue moramo da trpamo default/dojo1, default/dojo2 default/dojo 3 I tako do 5, mora da se za <text:s/>svaki okine reconcile, mi sad radmo 1n1 a nama ce trebati 1 na vise, <text:s/>imamo taj mapping izmedju refaktora I queue</text:span><text:span text:style-name="T5">a.</text:span></text:p>
      <text:p text:style-name="P21"><text:span text:style-name="T1">Event handler fukncija referncira dojo objekat, pronadjeni dojo objekti se mapiraju na neke druge objekte, pronalaze se dojo objekti koji imaju spec I guraju se u queue.</text:span></text:p>
      <text:p text:style-name="P21"><text:soft-page-break/><text:span text:style-name="T1">Mi ovde koristmo indekse da bi pretraga bila o(1) umesto da bude o(N), bez indeksiranja mi bi smo zapravo morali da idemo iterativno kroz kolekciju, ovako imamo mapu koja kesira rezultate I zato je o(1), ne moramo tako da radimo ali je to njegova preporuka, znaci da kreiramo mapu koja ce sve to da cuva I da ubrzava pretragu, mi te indekse koristimo u main.go fajlu valjda, to sad ima logiku za cuvanje u hash mapi, sacuvamo ceo kontekst kao kljuc a kao vrednost uzimamo naziv secreta.</text:span></text:p>
      <text:p text:style-name="P21"><text:span text:style-name="T1">Medjutim ova implementacija nije prefekna, nije sveobuhvatna, mi smo podesili secret da gleda operator da gleda izmene na cngp secret, znaci cloud neki postgress secret, medjutim posoji problem kako resiti slucajeve npr trenutno watcher gleda na create, a update I delete generise dogadjaje na osnovu cnpg secreta, ono sto je za kontroler od interesa je samo update, znaci mi bi trebali da gledamo samo na update izmene, create nam nije od intersea jer ce create da vec bude kreiran pre nego sto krene deployment, mi mozemo u watches sekciji da kazemo da hocemo da posmatramo samo update a ne I create dogadjaje, to bi bio neki mikro improvement, kad god se desi update moramo da updatujemo dojo secret I da restartujemo sve podove I da uzmemo u obzir te promene koje su se desile unutar secreta, ono sto je on tu definisao je da kontroler ne zna da reaguje na delete dogadjaj, on nema adekvatno resenja da nam ponudi u trenutnoj situaciji, znam da odradi update, create nije od interesa, delete kad neko obrise taj secret onda dojo aplikacija nece raditi, onda treba da stoji napomena u dokumentaciji da naznacimo developerima I ostalima da ne brisu taj secret tako da nebi polupali nesto, mi na odbrani mozemo da to kazemo, mi nismo handlovali taj slucaj, ne treba to da se dira I menja, operator ce sve znati da to pogasi da ne polupa, nema neko nista rucno da radi da dira I da menja, tako da je to skroz okay da kazemo da ako neko dodje rucno I obrise secret onda naravno da nece raditi, mi cak ni ne mozemo da pomognemo operatoru da to sredi, on mora da ceka da mi kreiramo secret da ga vratimo nazad, ne postoji adekvatno I jednostavn resenje za taj slucaj, to mu je okay da mozemo to da resimo. </text:span></text:p>
      <text:p text:style-name="P21"><text:span text:style-name="T1">Mi bi smo onda trebali u labelama da kazemo ovo I mi koristimo I onda u labelama kad pogledamo meta podatke da on zavisi od njega I pazljivije sa tim secretima, on misi da je jednostavnije nego da komplikujemo, ali pitanje je da li cemo imati benefite od tog kompliko</text:span><text:span text:style-name="T6">vali. </text:span></text:p>
      <text:p text:style-name="P22"><text:span text:style-name="T6">T</text:span><text:span text:style-name="T1">akodje moramo da definisemo rbac komandu da nas operator sme da izvrsava list komandu za neke resurse, bez toga necemo moci da kreiramo secret resurs pomocu dojo operatora, nema prava pristupa, on ima samo pravo pristupa da kreira deploymente, za secrete moramo da dodatno stavimo notaciju, to je definisano ovde, kako krenemo da budzimo nas kontroler, ova sekcija tu cemo da definisemo permisije da tako raste iz verzije u verziju, dodali smo da pored deploymenta on sme da rukuje I secret objektima.</text:span></text:p>
      <text:p text:style-name="P22"><text:span text:style-name="T1"/></text:p>
      <text:p text:style-name="P22"><text:span text:style-name="T1">Imamo ovde kako se pisu testovi, imamo unit testove, imamo dojo controller test, imamo primere kako se pokrecu testovi, mi mozemo rucno da okinemo svaku recocncile petlju, on je pisao iteracije reconcile petlje na tabli prosli termin, mi mozemo to rucno da okinemo, to cak I imamo ovde u testu.</text:span></text:p>
      <text:p text:style-name="P22"><text:span text:style-name="T1">Mi kad piesmo unit testove treba rucno u testu da pokrenemo reconcile funkciju I tako da testiramo to, ovako kroz debugger da neko kreira iz cuecuttla da kreira 5-6 iteracija pustimo da se okine sto je okay za debugovanje.</text:span></text:p>
      <text:p text:style-name="P22"><text:span text:style-name="T1">Treba da obratimo paznju na framework ogranicenja, ima neko ogranicenje da nam neda da brisemo namespace I to ce nam malo zakomplikovati after each I before each namespace, mi ne mozemo samo da stavimo before each delete all namespaces, kreiramo novi namespace I pripremimo enviroment za nas test, cisto da budemo svesni toga. </text:span></text:p>
      <text:p text:style-name="P22"><text:span text:style-name="T1"/></text:p>
      <text:p text:style-name="P22"><text:span text:style-name="T1">Logujemo se na doker, dajemo mu sliku da pushuje na docker hub I mi trebamo kao naredni korak da napravimo helm chart koji ce koristiti ovu verziju slike 040 da deployjuje nas operator (slajd 104) u prezentaaciji kubernetes operatori.</text:span></text:p>
      <text:p text:style-name="P22"><text:span text:style-name="T1"/></text:p>
      <text:p text:style-name="P22"><text:soft-page-break/><text:span text:style-name="T1">Mi smo se znaci samo subsrcibeovali na eventove lokalnog servera, make run lokalno pokrene I gleda te eventove, a da bude unutar clustera kao pod onda mora pomocu helmcharta da deployjuje, I zato koristimo make deploy koji radi uz pomoc customeize-a, to bi odprilike izgledalo ovako, kreiraj ovaj namespace, ovaj deployment sa ovom I onom konfiguracijom, tu nam se nalazi kontejner slika, to je konfiguracija deploymenta koji se odnosi na dojo operator.</text:span></text:p>
      <text:p text:style-name="P22"><text:span text:style-name="T1">On ocekuje da imamo u readme upustvo kako da instaliramo nas dojo operator uz pomoc helma, kako to moze da iskonfigurise, sta se to koristi, oce da kroz to prodjemo proleitmo, vidimo da to radi I funkcionise.</text:span></text:p>
      <text:p text:style-name="P23"><text:span text:style-name="T1">Verzija 5, integrisu se alarmi uz pomoc discorda, I on ima opciju da definise prometheus rule, ako je cpu usage pre 80% da mu stigne alarm na discord, onda koristmo dicord go biblioteku, naparvili smo nove crd-jeve, discord server, discord group I kanal, gde imamo jednu sekciju gde imamo wardnings, critical, kanale, </text:span></text:p>
      <text:p text:style-name="P23"><text:span text:style-name="T1">znaci diskord kanal se ne nalazi u kubernetesu, moramo da nadjemo nacin da kazemo kubernetesu da on ne brise resurs dokle god se on ne utvrdi da on nije obrisan na discord serveru, kad hocemo nesto van kubernetesa onda moramo da koristmo finalizer, I koristimo subresrurs finalizer, I tu definisemo dokle god on ne obrise finalizer garbage collector onda kube nesme da brise taj resurs. </text:span></text:p>
      <text:p text:style-name="P24"><text:span text:style-name="T1">Imamo na kraju link kako I zasto se koriste finalizeri, trebace nam finalizeri kad god manageujemo resurse van kubernetesa, sta god radimo piseo custom resurse mi koristimo finalizere</text:span></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8T14:21:45.439871072</meta:creation-date>
    <meta:generator>LibreOffice/7.3.7.2$Linux_X86_64 LibreOffice_project/30$Build-2</meta:generator>
    <dc:date>2026-05-28T16:46:45.161984330</dc:date>
    <meta:editing-duration>PT1H30M8S</meta:editing-duration>
    <meta:editing-cycles>23</meta:editing-cycles>
    <meta:document-statistic meta:table-count="0" meta:image-count="0" meta:object-count="0" meta:page-count="7" meta:paragraph-count="52" meta:word-count="4564" meta:character-count="26836" meta:non-whitespace-character-count="22308"/>
  </office:meta>
</office:document-meta>
</file>