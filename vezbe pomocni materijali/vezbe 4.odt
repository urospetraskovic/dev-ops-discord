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hilanka" officeooo:rsid="001d7bae" officeooo:paragraph-rsid="001d7bae"/>
    </style:style>
    <style:style style:name="P2" style:family="paragraph" style:parent-style-name="Standard">
      <style:text-properties style:font-name="Chilanka" officeooo:rsid="001ef100" officeooo:paragraph-rsid="001ef100"/>
    </style:style>
    <style:style style:name="P3" style:family="paragraph" style:parent-style-name="Standard">
      <style:text-properties style:font-name="Chilanka" officeooo:rsid="0020b142" officeooo:paragraph-rsid="0020b142"/>
    </style:style>
    <style:style style:name="P4" style:family="paragraph" style:parent-style-name="Standard">
      <style:text-properties style:font-name="Chilanka" officeooo:rsid="0021b2fe" officeooo:paragraph-rsid="0021b2fe"/>
    </style:style>
    <style:style style:name="P5" style:family="paragraph" style:parent-style-name="Standard">
      <style:text-properties style:font-name="Chilanka" officeooo:rsid="00238b97" officeooo:paragraph-rsid="00238b97"/>
    </style:style>
    <style:style style:name="P6" style:family="paragraph" style:parent-style-name="Standard">
      <style:text-properties style:font-name="Chilanka" officeooo:rsid="0023a5b1" officeooo:paragraph-rsid="0023a5b1"/>
    </style:style>
    <style:style style:name="P7" style:family="paragraph" style:parent-style-name="Standard">
      <style:text-properties style:font-name="Chilanka" officeooo:rsid="00244824" officeooo:paragraph-rsid="00244824"/>
    </style:style>
    <style:style style:name="P8" style:family="paragraph" style:parent-style-name="Standard">
      <style:text-properties style:font-name="Chilanka" officeooo:rsid="0025439e" officeooo:paragraph-rsid="0025439e"/>
    </style:style>
    <style:style style:name="P9" style:family="paragraph" style:parent-style-name="Standard">
      <style:text-properties style:font-name="Chilanka" officeooo:rsid="00271d48" officeooo:paragraph-rsid="00271d48"/>
    </style:style>
    <style:style style:name="P10" style:family="paragraph" style:parent-style-name="Standard">
      <style:text-properties style:font-name="Chilanka" officeooo:rsid="0028a296" officeooo:paragraph-rsid="0028a296"/>
    </style:style>
    <style:style style:name="P11" style:family="paragraph" style:parent-style-name="Standard">
      <style:text-properties style:font-name="Chilanka" officeooo:rsid="0029f0b9" officeooo:paragraph-rsid="0029f0b9"/>
    </style:style>
    <style:style style:name="P12" style:family="paragraph" style:parent-style-name="Standard">
      <style:text-properties style:font-name="Chilanka" officeooo:rsid="002ed358" officeooo:paragraph-rsid="002ed358"/>
    </style:style>
    <style:style style:name="P13" style:family="paragraph" style:parent-style-name="Standard">
      <style:text-properties style:font-name="Chilanka" officeooo:rsid="002f7c47" officeooo:paragraph-rsid="002f7c47"/>
    </style:style>
    <style:style style:name="P14" style:family="paragraph" style:parent-style-name="Standard">
      <style:text-properties style:font-name="Chilanka" officeooo:rsid="00320280" officeooo:paragraph-rsid="00320280"/>
    </style:style>
    <style:style style:name="P15" style:family="paragraph" style:parent-style-name="Standard">
      <style:text-properties style:font-name="Chilanka" officeooo:rsid="0033515a" officeooo:paragraph-rsid="0033515a"/>
    </style:style>
    <style:style style:name="P16" style:family="paragraph" style:parent-style-name="Standard">
      <style:text-properties style:font-name="Chilanka" officeooo:rsid="00349cc2" officeooo:paragraph-rsid="00349cc2"/>
    </style:style>
    <style:style style:name="P17" style:family="paragraph" style:parent-style-name="Standard">
      <style:text-properties style:font-name="Chilanka" officeooo:rsid="0035b4cf" officeooo:paragraph-rsid="0035b4cf"/>
    </style:style>
    <style:style style:name="P18" style:family="paragraph" style:parent-style-name="Standard">
      <style:text-properties style:font-name="Chilanka" officeooo:rsid="0037a7c8" officeooo:paragraph-rsid="0037a7c8"/>
    </style:style>
    <style:style style:name="T1" style:family="text">
      <style:text-properties officeooo:rsid="0020b142"/>
    </style:style>
    <style:style style:name="T2" style:family="text">
      <style:text-properties fo:background-color="#ffff00" loext:char-shading-value="0"/>
    </style:style>
    <style:style style:name="T3" style:family="text">
      <style:text-properties officeooo:rsid="00244824"/>
    </style:style>
    <style:style style:name="T4" style:family="text">
      <style:text-properties officeooo:rsid="0027c630"/>
    </style:style>
    <style:style style:name="T5" style:family="text">
      <style:text-properties officeooo:rsid="002b6dd1"/>
    </style:style>
    <style:style style:name="T6" style:family="text">
      <style:text-properties officeooo:rsid="002d5d3b"/>
    </style:style>
    <style:style style:name="T7" style:family="text">
      <style:text-properties officeooo:rsid="00396d97"/>
    </style:style>
    <style:style style:name="T8" style:family="text">
      <style:text-properties officeooo:rsid="003a1d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vimo svoj operator, postujemo operator pattern, neka open d3 api sema, imamo komandu koja mapira ovu strukturu na tu semu, I mozemo pomocu notacija dodatno da napisemo neka pravila koja ce biti u toj semi, I mi pomocu make manifest generate dobijemo ovde <text:s/>u config imamo crd I q builder automatski napravi crd gde zapravo definise nas custom resource definition, tu se radi validacija tih podataka, neku osnovnu validaciju mozemo da uradimo tu, I namapiramo na nasu strukturu, I mi ovo mozeom I rucno da pisemo, ali sto bi smo to pisali, ovo je api version njih imamo u custom resource definition, to mzoemo I od nule ali je puno napora I puno rpostora za gresku I onda koristimo onaj builder.</text:p>
      <text:p text:style-name="P1">Moramo da napravimo kontrolek koji ce da manageuje taj custom resource definition, zato isto kada preko komande generisemo novi resurs mi imamo kontroler koji ce to manage-ovati za nas, da slusa sve moguce eventove koji su vezane za taj dojolist, za sve te kindove imamo automatski podesen watcher I mi smo detektovali kada se to triggeruje ima tu petlja koja manageuje, procita se request, dobijamo na osnovu namespace-a I namea, tu treba da nam bude osnova svega, ta biblioteka, I ispisujemo, svaki put kada se nesto ispise mi to triggerujemo I na kraju se triggeruje if koji kaze nesto kada se zavrsi petlja.</text:p>
      <text:p text:style-name="P1">Sada treba da predjemo na verziju 2 kada hocemo da deployujemo nasu aplikaciju, onda predjemo na deployment, to je resurs iz kubernetesa, mi samo setujemo sliku, imamo 4 verzije dojo aplikacije, prva ispisuje endpoint, drugi je helllowolrd ona zahteva konekciju ka bazi, kako koristimo novu verziju trebace nam vise komponenti da deployjejmo, trebace nam vise stvari za bazu I tako postepeno komplikujemo aplikaciju.</text:p>
      <text:p text:style-name="P1">Treba da obratimo paznju da ce nam on automatski dodati notacije koje ce izgenerisati rbac, to je out of the box, kada kreiramo kontroler on nam to auomatski kreira, on moze a radi get, list, upgrade create za sve dojo resurse, to je kompletan set, mi mozemo da skinemo create, mozemo da update patch I tako to, to je kompletan set akcija koje mozemo da radimo.</text:p>
      <text:p text:style-name="P1">Mozemo da imamo neki drugi reconciler koji ce samo da gleda I da cita nesto, zasto je to bitno, mi cemo sad u ovom menjati ovu sekciju, onda kazemo okay, mozes isto da radis update patch na statusu, mozes da radis sa finalizerom, to cemo posle videti sta su statusi I finalizeri u kubernetesu.</text:p>
      <text:p text:style-name="P1">Cim imamo notaciju mi u pozadini generisemo yaml fajl, ovde kada uradimo make manifest generate idemo na rbac I on nam zapravo izgenerise sve sto nam treba.</text:p>
      <text:p text:style-name="P1">Kreira vise rollera, dojo editor, dojo admin I drugo.</text:p>
      <text:p text:style-name="P1">Mi smo prolazili sta je cluster role, pa se pocetite toga, ili promptujte pa izguglajte, mi moramo da dodelimo permisije nasem operatoru da ima pravo da manageuje neki resurs clustera sa standardnim pristupom, mi imamo nasu aplikaciju, nasu bazu, ne kreiramo nista novo, mi samo slusamo requestove I to je to, nista ne manageujemo. </text:p>
      <text:p text:style-name="P1">Ali zato ovde u dojo aplikaciji moramo da manageujemo I zato moramo da imamo cluster role, ovde imamo jos dodatne stvari, kako se radi leader elekcija, mozemo da imamo vise replika operatora, I oni trebaju da pristupaju tom delom kubernetesa, ako hocemo da ubacimo scaleovanje I to on nudi po defaultu da integrise sa prometheusom, to sluzi da dobijemo /metrics endpoint gde su sve metrike dostupne I to prometheus moze da scrapuje.</text:p>
      <text:p text:style-name="P2">Ovo je bila verzija 1 dojo operatora, sad prelazimo na verziju 2.</text:p>
      <text:p text:style-name="P2">Krecemo da radimo implementaciju, stvari se komplikuju, imamo neku petlju koja se okida na promene objekata, zelimo da upgradujemo tu reconcile petlju da kreira deployment za tu dojo aplikaciju, treba da citamo te replike I da na osnovu te vrednosti podesimo replicas u deploymentu, ono sto je bitno da se napomene je da je reconciler stateless, on ne pamti stanje iz prethodnih iteracija, nije da imamo jednu varijablu iz prethodnih operatora, ako to radimo imamo problem, sta ako imamo 2 replike operatora, imamo 1000 bugova 1000 problema na osnovu tog pristupa I zato se uvek preporucuje da imamo stateless, sve sto treba da pamtimo za taj objekat treba da koristimo status objekat, imamo spec I status objekat I svo trenutno stanje ucitamo na taj objekat. Procitamo spec, procitamo status I pokusavamo da ono sto je definisano u specu da to stanje napravimo <text:soft-page-break/>u statusu, pokusava da inkrementalno mozda u vise prolaza te pelje da se to desi, zato imamo taj status, sad smo uradili deployment I stavimo da je status deployment, ili executed deployment, naredni korak je da napravimo secret koji povezuje sa bazom, I napamiramo na osnovu general stanja. I trebamo da budemo svesni cim na taj nacin radimo trebamo da implementiramo idepotentnons, odnosno da reconciler da recocniler bude idempotentan, idempotency znaci koliko god dobijemo tu akciju da ona nece imati neke dodatne efekte osim prvog puta kada se desi, znaci dalji pozivi nebi trebali da imaju dodatne promene, to se radilo sa queueovima. To resava problem dupliranih poruka, ovde imamo duplirane eventove, ako dobijemo isti event. Matematicki to je f(f(x)) = f(x).</text:p>
      <text:p text:style-name="P2">A * A = A, kod mnozenja to su jedino 0 I 1, 1 * 1 = 1, 0 * 0 = 0. Nije lako tu idempotentnost implementirati, sacemo videti kako se komplikuje stvar.</text:p>
      <text:p text:style-name="P2">Ako mi non stop kreiramo izmene ukoliko uvek nesto moramo da radimo a izmene se nisu desile, na svaki event moramo da odreagujemo, nismo sposobni da detektujemo da li se to stanje promenilo ili ne mi imamo beskonacnu petlju. I idempotentni nacin na koji se reconciler pravi vise nije status objekat, na osnovu status objekta pazimo u kojoj fazi se objekat nalazi I nastavi da se procesira. Sta ce biti status, to vide developeri kada se implementira kontroler, mozemo apsolutno bilo sta da rokamo u status objekat, jer to koristimo da reconcilujemo objekat sa zeljenim stanjem, sta god nam treba, mape hash liste, to stanje reconcilujemo sa trenutnim stanjem. </text:p>
      <text:p text:style-name="P2">Bitno je da se napomene pojam level based I edge based, moramo da pravimo razliku izmedju ta 2 pojma, kubernetes se bazira na level based dizajnu. To znaci <text:span text:style-name="T1">da ako se desilo 5 izmena da mi necemo 5 puta da reconciluejmo, nego uzmemo samo poslednju verziju, samo gledamo poslednju izmenu, u reconcile petlji se desi 5 promena objekta, nas ne interesuju one prethodne, nas interesuje samo poslednje stanje, samo dovodimo ovo poslednje, naravno tu treba paziti, ako smo mi doveli jedno stanje da li mozemo da vratimo ono naredno, to sve zavisi od nase implementacije. </text:span></text:p>
      <text:p text:style-name="P3">Prvo trebamo da pogledamo kako izgleda status naseg objekta, mi smo lepo definisali spec kako moze da se konfigurise, a status nam izgleda ovako, znaci mi pamtimo neki conditions, neke kredencijale, neki id, secret konekcija ka bazi, I koristi koliko su replika spremne da slusaju saobracaj, koliok su spremne za update, koliko je dostupno, koliko je true, ako se ova ready replika poklapa sa replicas ovde onda ce I ovo ovde dole da bude ready, ovo je nacin gde se zapravo proverava da li je ovaj ready I to je logika za izlazak iz reconcile petlje. </text:p>
      <text:p text:style-name="P3">Treba da znamo ko je aktivan a ko nije I treba da saljemo dobre poruke kad je ko slobodan koja replika I to da se nebi patili na odbrani. Bitan nam je taj condition, na osnovu conditiona gledamo koja su sva moguca stanja, generalno je pravilo da postoje 3 tipa conditiona, imamo available, resource is pooling, funckional is being pooled for api, I imaomo degredated znaci da je resource puko, nesto je puklo unutar klastera, nesto je pogresno izkonfigurisano I mi necemo nikad proci, mora neko dodje rucno da fiksa to, to sluzi taj status. Mi u conditionu mozemo da pravimo svoje, ali konvencija I ono sto su kubernetes najbolje prakse je da se ispustuju ta 3. Jer npr ako neko drugi treba da se nakaci da gleda nas operator mi moramo jasno da definisemo nas API, to je ono sto korisnici vide I te statuse, drugi operatori mogu to da koriste I da gledaju da li je uspesno ili nije uspesno, zamislimo da imamo neki deployment, ako je zeleno sve radi, ako je zuto onda progressuje, moramo da pazimo da bude backward compatible I forward compatible, ako hocemo nesto da menjamo mora pazimo. </text:p>
      <text:p text:style-name="P3">Nesto gleda available status I on uporno pokusava da deployuje I on gleda gleda gleda I gleda I tek kada available postane true on ga deployje, neki aruk cd tako nesto je reko da je to. </text:p>
      <text:p text:style-name="P3">Available na true, progessing na false, I degradate na false, nekad mora sva 3 da se poklope, ali npr neki nisu, mozemo da kazemo da je progressing true, ali je degradated isto true, doslo je do neke greske od koje ne moze da se oporavi, mi smo u deadlocku I mi moramo da se oporavimo od toga, to dobijemo po defaultu, on je sve to morao rucno da definise, conditions je neki rucni nacin kako resursi komuniciraju sa nama, ovo ostalo je pomocno, ovi ostlai alati se integrisu sa conditionom, pa onda gledaju ostale neke <text:soft-page-break/>filmove, I mi cemo to da koristimo, najbolje je da napravimo neku tabelu stanja, kad je u ovom stanju progressing ce da bude true, degredated na false, isto tako npr mi kada stavimo progressing, kada krenemo da reconcilujemo objekat. Tu nema definisano pravilo, koliko cemo listi da imamo, tu ne postoji nikakva konvencija, to ostaje na nama, prvenstveno sto je on gledao kako su drugi implementirali oni dodaju po potrebi.</text:p>
      <text:p text:style-name="P4">Ono sto smo definisali u conditionima to trebamo da ispostujemo da bi se drugi alati mogli integrisati sa nasim operatorima, to je njemu bilo najneintuintivnije da skonta cemu sluze ti conditioni, koristimo ova 3 a mozemo I dodatne conditione, sad tu nastaje problem da li je mogao da doda nove conditione I da ih tu koristi, ali prvenstveno ne, on koristi ta 3 I ostalo roka dole ispod I gleda taj status. </text:p>
      <text:p text:style-name="P4">To je sad siva zona da li je bolje ovako ili onako, to sad sve zavisi I to su neke finese.</text:p>
      <text:p text:style-name="P4">Sad kad znamo sta je condition treba da definisemo tu tranziciju sta je zapravo progressing available I degredated, najlakse je da krenemo od degradated, moramo da vidimo od kojih gresaka mozemo da se oporavimo a od kojih ne mozemo, ima greska od koje mozemo da es oporavimo 409 conflict, od te greske se mozemo oporaviti, posto mozemo mi cemo ostaviti progressing na true I onda trigerrujemo petlju da se okine, ali npr ako imamo gresku koja nastaje da nismo lepo konfigurisali deployment, recimo stavili smo string kod replika, imamo gresku od koje ne mozemo da se oporavimo, jedini nacin je da user dodje I da ispravi gresku iz stringa u integer, okay ti si nevalidno ovo konfigurisao I ide to u degredated jer ne moze da se oporavi dok se ne desi neka intervencija sa strane.</text:p>
      <text:p text:style-name="P5">Mi smo u ovoj nasoj implementaciji rekli imamo 3 conditiona, avaialble je true ako postoji bar jedna replika dojo aplikacije, u suprotnom je false, samo 1 mora da bude ziva da nasa aplikacija moze da prima saobracaj, degredated je true ukoliok je nastala greska koja nema oporavak, degredated procesi su medjusobno iskljucivi, ukoliko je degredated true onda mora da processing false, zbog toga u kodu postoji pomocna metoda, set unrequireable status, I njena inverzna metoda set progress status. Znaci mozemo da definisemo pomocne funkcije.</text:p>
      <text:p text:style-name="P5"><text:span text:style-name="T2">Reconciler ne sme da menja spec objekta, sme samo da menja status objekta</text:span>, ne moze operator da menja, e hocu 2 e sad ces imati 5, znaci jer je stateless I nekad mora u vise iteracija da se prodje da bi doso u zeljeno stanje.</text:p>
      <text:p text:style-name="P5">On je kopiro status od deploymenta, to je sve kopirao od deployment statusa koji je u kubernetesovom engineu I onda je poravnao te statuse, I onda kako se ponasa deployment tako updatuje te stvari, nije puno filozofirao nego je ukrao postojece koncepte iz kubernetesa.</text:p>
      <text:p text:style-name="P6">Svaki kubernetes objekat ima svoju verziju kad god uradimo update menja se verzija, kad god uradimo nesto menja se verzija, dobijamo 409 konflikt gresku ako nemamo poslednju verzju aplikacije kod sebe u cache-u, ne interesuje me ono izmedju stanje, dobices 409 konflikt I update nece proci, zbog toga svaki put kad uradimo neki update onda reconciler sme samo status da menja, ne sme da menja spec, kad god uradimo update, ako nesto drugo radimo to ce nam pucati onda ako uradimo update on generise novu verziju, inkrementira je, dok je ne dobijemo u cacheu onda ce nam updateovi pucati, zato kad god uradimo update onda nam pucaju petlje I onda cekamo narednu iteraciju, naredna iteracija treba da skonta za taj event, to je onda najvece cimanje, mi trebamo da skontamo ako je u statusu nesto ima da izadje iz petlje kao idempotentnost, za ostale slucajeve imamo da ispraimo stanje, mi citamo status objekta dok ne skontamo sta treba da radimo I onda da krenemo to sto trebamo da radimo. </text:p>
      <text:p text:style-name="P6">Trebace nam puno vremena da skontamo sve slucajeve I da sve to sredimo. <text:span text:style-name="T3">Jako je error prone I zato treba dobro istestirati.</text:span></text:p>
      <text:p text:style-name="P7">Mi cemo dobiti update I cekamo da nam api server to propagira unutar cachea, mi treba da budemo svesni, u nekom vremenu se triggeruje reconcile petlja, api server to propagira, promene se odnose na dojo I trebalo bi da se opet okinu, mi smo stavili status da je progressing, ovaj update ce u tom trenutku opet krenuti, dobijamo gresku da li je error razlicit od nil, krecemo na naredni korak, I onda kreiramo, prvo kreiramo prazan deployment po referenci, dobavljamo, da li postoji taj deployment sa tim nazivom I <text:soft-page-break/>namespaceom, u koliko nepostoji pozovemo metodu deployment for dojo, to je pomocna metoda za deployment, I handlujemo gresku, ako je error razlicit od nil onda failed I kazemo da je unrecovered status, reason je stalled I could not define deployment structure je poruka.</text:p>
      <text:p text:style-name="P8">Kazemo da dojo ownership ima nesto nad deploymentom, I onda ako tu nesto pukne od toga ne mozemo da se oporavimo, on je kreirao deployment I hoce da setuje ownership, mora da se ispostuju neka pravila, na jednom objektu moze da postoji samo jedan ownership, nece se desavati, ove set controll reference, da li je nesto dobro izkonfigurisano u deploymentu moze da pukne, to su stvari koje ne mogu da se porede, da smo mi pogresno izkonfigurisali, to je jedna od gresaka kod kojih nema oporavka.</text:p>
      <text:p text:style-name="P8">U koliko smo dobili bilo koju gresku, reason je stalled, I could not find deployment structure, na taj nacin sta radi unrecalled status, stavlja degredated na true, stavlja processing na false I radi update tog statusa.</text:p>
      <text:p text:style-name="P8">Moramo uvek da pisemo if err != nil &amp;&amp; spierrors.IsConflict(err) moramo da gledamo tako da nije nil, u koliko je nil super, idemo u degredated status I on ga brzo resi, u koliko nije nil dobice gresku I ide back of propagation error.</text:p>
      <text:p text:style-name="P8">Razlog zasto se to radi je da bi izbego slucaj ove 409 greske, znaci on krene prvo ide processing, on krece drugi put da implementira, dobija gresku, treba da setuje, neko naleti na api I izmeni se stanje objekta, nema posebnu verziju cachea, nije stiglo da se izmeni, on ne radi sa poslednjom verzijom, dobije 409, izlazi, dropuje sve, I to je nacin tako handlovati konflikte, osedecemo od toga, u bilo kom trenutku moze da nam uleti I onda dobijemo tu gresku I trebamo sve da batalimo, znaci svaki update moramo taj deo koda da ubacujemo, ukoliko ne radi cekamo da ga triggeruje I cekamo stanje, ako nije onda nastavljamo dalje, to je ono sto ce nas najvise nervirati, taj update uvek moramo da catchujemo da li je bilo uspesno u narenoj iteraciji.</text:p>
      <text:p text:style-name="P9">Znaci tu smo handlovali taj slucaj, kreira se dojo, ukoliko je neuspesno, ukoliko je proslo idemo dalje, kreiramo deployment, idemo r.create I prosledimo deployment iz funkcije, sa nasom slikom, konfiguraciom security kontektsta I ako se desi greska mi nemozemo od toga da se oporavimo I onda intervenisemo, samo ovde nije stalled nego failed, stalled je kada ne prolazi u samoj konfiguraciji a failed je kada cluster nije mogao da kreira deployment, znaci da nije do mene nego je do deploymenta, nekome smeta to, tu pravimo razliku izmedju stalled I failed, mi mozemo uzeti neku drugu notaciju da bude intuitivno, failed to create deployment to cluster, I ovo je jedino sto je happy path, u koliko prodje ovaj create on setuje status reason creating na dojo objektu I waiting for nesto to start. Set progress status sta uradi, on stavlja processing na true, I updatuje ga na isti nacin, ista logika kao pre samo sto se conditioni menjaju, bilo true, sad je false.</text:p>
      <text:p text:style-name="P9">Sto znaci da ce taj njegov happy path: </text:p>
      <text:p text:style-name="P9">1. iteracija kreira dojo, condition processing true, reason je init</text:p>
      <text:p text:style-name="P9">2. happy iteracija ima dojo, condition processing je na true, samo sto ima drugi reason, reason je creating, I tu smo kreirali deployment sa tim stavkama koje su tu definisane, bitno nam je da ownership ima dojo, to je jako bitno. Znaci u ovoj drugoj iteraciji happy patha mi kreiramo deployment, setujemo ownership, operator za deployment ce to setovati. Mi cemo onda u trecoj iteraciji da proverimo taj condition. <text:span text:style-name="T4">Ne treba da zaboravimo da ovde radimo samo jednu izmenu u iteraciji, ispostovali smo, setujemo status na creating I tu zavrsavamo petlju.</text:span></text:p>
      <text:p text:style-name="P10">3. Iteracija krece proveri ako je not found, u koliko dobije neku gresku koja nije not found znaci da se desila greska, u koliko dobijemo praznu gresku znaci da vec deployment postoji, sta onda radimo, u 3. iteraciji cupamo broj replika, setujemo, ako je replika found, found je deployment, proveravamo da li se broj replika u deploymentu poklapa sa brojem replika iz ovog speka, u koliko to nije onda ispisemo gresku da se skalira sa ovim brojem na onaj broj, I stavljam u found spec broj replika gde je taj broj replika I radimo update.</text:p>
      <text:p text:style-name="P10">Zasto ovo radi, ovo u 3. iteraciji nema smisla, ali kada jedanput prodje sve I hocemo da idemo sa 3 na 5, proverimo da li se poklapaju, u koliko se ne poklapaju nece se triggerovati, to je update replika, taj kod handluje to I nista samo menjamo broj replika u deploymentu, updatujemo deployment, ostavimo kubernetes da uradi to, opet ona <text:soft-page-break/>sugava logika kojom proverimo da li je konflikt, ako je konflikt znaci da ne radimo sa poslednjom verzijom I onda cekamo poslednju verziju, a sve sto nije 409 konflikt onda mi to ne znamo da handlamo I onda stalliramo, tu mozemo I dalje da gledamo da pokusamo da proverimo koja je tacno greska, on nije hteo to da komplikuje posto je to primer, I onda mozemo da vidimo da li mozemo da se recoverujemo od nekih gresaka. </text:p>
      <text:p text:style-name="P11">U deploymentu mi mozemo da menjamo samo replike, ako neko hoce da promeni verziju slike onda nas operator nije sposoban za to, ako neko nesto u specu izmeni onda nece moci, on zna samo tu verziju I to je to, <text:span text:style-name="T5">I to bi imalo isto tako smisla da mi to odradimo, </text:span><text:span text:style-name="T6">takodje moramo da pazimo da li se menja baza u novoj verziji, I svi prave operatore za te odredjene verzije, to sve prvenstveno zavisi, za postgres on isto pravi operatore za tu verziju postgresa, to je neki sitni bug, nema nista u logici za deployment a nece dodati nista u logici za operatora, uglavnom pravimo operatore za odredjenu verziju za to.</text:span></text:p>
      <text:p text:style-name="P12">Znaci u 3. interaciji je conditoin true, available je false</text:p>
      <text:p text:style-name="P12">a u 4. iteraciji ce prvo bili false, availability je true, u obe iteracije je degredated true, I u 3. I u 4. </text:p>
      <text:p text:style-name="P13">U conditionu 3 on moze da bude dok god se deployment ne odradi.</text:p>
      <text:p text:style-name="P14">Ovo se razlikuje na projektu jer ce naredna verzija da doda secrete I onda ce te secrete da attachuje kao enviroment varijable, koristimo env sec I sva taj kod secreta ce biti attachovano na kontejnere kao enviroment varijable, mi trebamo jos na sve to da odradimo monitoring, da podesimo prometheus ruleove, da scrapuje nase metrike iz nase aplikacije, mi cemo isto imati opciju sa bazama da biramo mongo ili postgress bazu, I mi trebamo da kreiramo, nama se ne zavrsava na jednom resursu nego vise resursa, neki delovi koda ce se poklapati I kopirati, mi moramo pored toga da izhandlujemo, mi cemo koristiti vec postojece stvari kao prometheus, necemo da koristimo nista novo samo da ga izkonfigurisemo, imamo prometheus operator on ima prometheus rule, tu izkonfigurisemo endopinte I kreiramo to. Kada se brise dojo on da se brise I secret I prometheus rule I deployment, samo neki vide orhestracije vise objekata koji su povezani I mi cemo morati to da radimo u vise koraka, mi mzoemo npr za dojo, a necemo npr da manageujemo druge rule-ove, to cemo sada da objasnimo kako da radimo tu raspodelu.</text:p>
      <text:p text:style-name="P15"/>
      <text:p text:style-name="P15">Kuca u terminalu kubectl get crds, I kaze a kad god updatujemo nesto mi moramo da updatujemo crd, to je najveci problem kubernetesa, ako uradimo describe crd dojo mi cemo dobiti neku bulju, u koliko promenimo spec I status mi moramo to da updatujemo, imamo dodatnu komandu koja se zove makeinstall, ali pre toga manifest generate, ovo smo vec radili, ako uradimo update crd-ja, moramo makeinstall, I kada pogledamo crd-jeve vidimo danasnji datum, nije se desila nikakva izmena, ali na to obratimo paznju, gledamo sa kojom verzijom crd-ja radimo I makeinstall uradi kubectl apply I instalira.</text:p>
      <text:p text:style-name="P16">Uradimo make run da pokrenemo kontroler, imamo primer u samples, kubectl apply -f config/samples/core I to sad debugujemo.</text:p>
      <text:p text:style-name="P16">Onda kuca kubectl get all, dojo</text:p>
      <text:p text:style-name="P17">vidi da ima neki problem imamo 3 replike, ne radi status je imagepullbackoff znaci da nema internet pa ne moze da pulluje, u pozadini vidimo da smo kreirali deployment, a on u pozadini kreira replicatoin set, imaom 0/3, on hoce da sve ovo ostalo bude tako, on trenutno ima samo age tu, I ovaj desired I current sve vuce odatle, </text:p>
      <text:p text:style-name="P18">Jedino sma api server da menja, sve ostale komponente, web hookovi, operatori, kubleti, sve gledaju api server, gledaju njegov event bus, I kesiraju izmene kod sebe u kesu, I na taj nacin procesiraju podatke, da ne bi spamovali api server, slusas na izmene, kesiras kod sebe, I time uploadujes api server, ne samo operatori I kubleti, I kontroler manageri I scheduleri, on I manageuje bazu, sve ostale komponente slusaju, kesiraju kod sebe, ovaj kbuilder koristi biblioteku za kubernetes, u toj biblioteci smo koristili neesto, to kada korisitmo u pozadini imamo komponentu reflektor, u reflektoru definisemo pravila, koristimo stvari neke I gledamo na sta se predplacujemo, mi kazemo da gledamo dojo objekte I sve evente za dojo objekte, reflektor gleda sve eventove, on kada to dovuce cuva se u cacheu, svaki operator ima svoj cache, u cache-u gura kompletan sadrzaj objekta, kompletaj json, u workqueue namespace/name gura izmena, desila se izmena, <text:soft-page-break/>kompletno stanje objekta je u cacheu, u workqueue stavi samo id, I tu se popunjava, to je ono zapravo sta reconciler procesira, ono sto se doda u working queue, to ce triggerovati reconciler queue, I trebalo bi da bilo koje izmene to urade, to se gurne na queue, gurne u cache I triggeruje se reconciler, get metoda cita iz cachea, update metoda direktno na api server, to je ono sto moramo da obratimo paznju, kada uradimo api.get, on radi sa cacheom, dobijemo ovo I ono, api server nebi mogo to da izgradi, imamo taj uploading da gledaju I cuvaju kod sebe u cacheu, kad god se desi neki update mi uradimo update statusa, to ide direktno na api server I menja se verzija, refaktor ce to detektovati, gurnuce to u queue I bice izmena, moramo da obratimo paznju da ne uvodimo cirkularnu petlju. Nama treba 5 iteracija da zavrsimo samo happy path ne racunajuci ostale.</text:p>
      <text:p text:style-name="P18">Kada radimo update pustimo da se izvrsi, dobijamo posebnu verziu na cacheu gde api server triggeruje update, kao sto mi radimo tako neko moze da posmatra nasu dojo aplikaciju, tako api server managuje stanje za nas I svima kaze sta se desava, zato je preporuka kada imamo happy path da imamo update I vratimo nil, to vratimo, to nam je uspesno, mi ako smo radili update triggerovace nam se opet petlja, ako se desi neka greska od koje ne mzoemo da se oporavimo onda ne moramo da vratimo result, bitno je da vratimo ono sto mozemo, neki error propagation, on ce opet da gurne u work queue novi item, krenuce da ga procesira, ide se na back propagation, to je ono sto pokusavamo da uradimo, dobijamo gresku od koje ne mozemo da se oporavimo, guramo to opet u queue I pokusavamo da se oporavimo, <text:span text:style-name="T7">znaci ja sam dobio gresku od koje ne mogu da se oporavim, necu trpati nista u queue, uradicu samo update, I on ce njega da trigeruje, nece nitsa novo da odradi I onda mora neko da intervenise, od onih sto mozemo da se oporavimo, networking, pao je node I tako to, e za to imamo back propagation I za to imamo vremena da se oporavi, tako da su to razlicite strategije za te errore. </text:span><text:span text:style-name="T8">Mozemo isto da stavimo timer posle 10 sekundi da se objekat triggeruje result nesto, opet mi triggeruj loo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14:19:33.860154748</meta:creation-date>
    <dc:date>2026-05-21T17:16:23.215110587</dc:date>
    <meta:editing-duration>PT1H2M59S</meta:editing-duration>
    <meta:editing-cycles>17</meta:editing-cycles>
    <meta:generator>LibreOffice/7.3.7.2$Linux_X86_64 LibreOffice_project/30$Build-2</meta:generator>
    <meta:document-statistic meta:table-count="0" meta:image-count="0" meta:object-count="0" meta:page-count="6" meta:paragraph-count="48" meta:word-count="4165" meta:character-count="24115" meta:non-whitespace-character-count="19985"/>
  </office:meta>
</office:document-meta>
</file>